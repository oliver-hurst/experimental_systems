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oboto" svg:font-family="Roboto" style:font-family-generic="system" style:font-pitch="variable" svg:panose-1="2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style:style style:name="P20" style:parent-style-name="Normal" style:family="paragraph">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T24"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Hyperlink" style:family="text">
      <style:text-properties fo:font-weight="bold" style:font-weight-asian="bold" style:font-weight-complex="bold"/>
    </style:style>
    <style:style style:name="T29" style:parent-style-name="Hyperlink" style:family="text">
      <style:text-properties fo:font-weight="bold" style:font-weight-asian="bold" style:font-weight-complex="bold"/>
    </style:style>
    <style:style style:name="T30" style:parent-style-name="Hyperlink"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Hyperlink" style:family="text">
      <style:text-properties style:text-position="super 58.3%"/>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8"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9"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0"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1" style:parent-style-name="Normal"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style:font-name="Roboto" style:font-name-asian="Times New Roman" fo:font-weight="bold" style:font-weight-asian="bold" style:font-weight-complex="bold" fo:color="#111111" style:letter-kerning="false" fo:font-size="9pt" style:font-size-asian="9pt" style:font-size-complex="9pt" style:language-asian="en" style:country-asian="GB"/>
    </style:style>
    <style:style style:name="T67" style:parent-style-name="Hyperlink" style:family="text">
      <style:text-properties fo:font-weight="bold" style:font-weight-asian="bold" style:font-weight-complex="bold"/>
    </style:style>
    <style:style style:name="T68" style:parent-style-name="DefaultParagraphFont" style:family="text">
      <style:text-properties style:font-name="Roboto" style:font-name-asian="Times New Roman" fo:font-weight="bold" style:font-weight-asian="bold" style:font-weight-complex="bold" fo:color="#111111" style:letter-kerning="false" fo:font-size="9pt" style:font-size-asian="9pt" style:font-size-complex="9pt" style:language-asian="en" style:country-asian="GB"/>
    </style:style>
    <style:style style:name="T69" style:parent-style-name="Hyperlink" style:family="text">
      <style:text-properties fo:font-weight="bold" style:font-weight-asian="bold" style:font-weight-complex="bold"/>
    </style:style>
    <style:style style:name="T70" style:parent-style-name="Hyperlink"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Hyperlink"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text-position="super 58.3%"/>
    </style:style>
    <style:style style:name="T75" style:parent-style-name="DefaultParagraphFont" style:family="text">
      <style:text-properties fo:font-weight="bold" style:font-weight-asian="bold" style:font-weight-complex="bold"/>
    </style:style>
    <style:style style:name="T76" style:parent-style-name="Hyperlink"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58.3%"/>
    </style:style>
    <style:style style:name="T78" style:parent-style-name="DefaultParagraphFont"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text-position="super 58.3%"/>
    </style:style>
    <style:style style:name="T81" style:parent-style-name="DefaultParagraphFont" style:family="text">
      <style:text-properties fo:font-weight="bold" style:font-weight-asian="bold" style:font-weight-complex="bold"/>
    </style:style>
    <style:style style:name="T82" style:parent-style-name="Hyperlink"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Hyperlink" style:family="text">
      <style:text-properties fo:font-weight="bold" style:font-weight-asian="bold" style:font-weight-complex="bold"/>
    </style:style>
    <style:style style:name="T85" style:parent-style-name="Hyperlink" style:family="text">
      <style:text-properties fo:font-weight="bold" style:font-weight-asian="bold" style:font-weight-complex="bold"/>
    </style:style>
    <style:style style:name="T86" style:parent-style-name="Hyperlink" style:family="text">
      <style:text-properties fo:font-weight="bold" style:font-weight-asian="bold" style:font-weight-complex="bold"/>
    </style:style>
    <style:style style:name="T87" style:parent-style-name="Hyperlink"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Hyperlink" style:family="text">
      <style:text-properties style:text-position="super 58.3%"/>
    </style:style>
    <style:style style:name="T91"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 style:parent-style-name="Normal" style:family="paragraph">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T109" style:parent-style-name="Hyperlink" style:family="text">
      <style:text-properties fo:font-weight="bold" style:font-weight-asian="bold" style:font-weight-complex="bold"/>
    </style:style>
    <style:style style:name="T110" style:parent-style-name="Hyperlink" style:family="text">
      <style:text-properties fo:font-weight="bold" style:font-weight-asian="bold" style:font-weight-complex="bold"/>
    </style:style>
    <style:style style:name="T111" style:parent-style-name="Hyperlink"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P114" style:parent-style-name="Normal" style:family="paragraph">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T116" style:parent-style-name="Hyperlink"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Hyperlink"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T126" style:parent-style-name="Hyperlink" style:family="text">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T128" style:parent-style-name="Hyperlink"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Hyperlink"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Hyperlink"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Hyperlink"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Hyperlink" style:family="text">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T140" style:parent-style-name="Hyperlink"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style:font-name="Roboto" style:font-name-asian="Times New Roman" fo:font-weight="bold" style:font-weight-asian="bold" style:font-weight-complex="bold" fo:color="#111111" style:letter-kerning="false" fo:font-size="9pt" style:font-size-asian="9pt" style:font-size-complex="9pt" style:language-asian="en" style:country-asian="GB"/>
    </style:style>
    <style:style style:name="T147" style:parent-style-name="Hyperlink" style:family="text">
      <style:text-properties fo:font-weight="bold" style:font-weight-asian="bold" style:font-weight-complex="bold"/>
    </style:style>
    <style:style style:name="T148" style:parent-style-name="DefaultParagraphFont" style:family="text">
      <style:text-properties style:font-name="Roboto" style:font-name-asian="Times New Roman" fo:font-weight="bold" style:font-weight-asian="bold" style:font-weight-complex="bold" fo:color="#111111" style:letter-kerning="false" fo:font-size="9pt" style:font-size-asian="9pt" style:font-size-complex="9pt" style:language-asian="en" style:country-asian="GB"/>
    </style:style>
    <style:style style:name="T149" style:parent-style-name="Hyperlink" style:family="text">
      <style:text-properties fo:font-weight="bold" style:font-weight-asian="bold" style:font-weight-complex="bold"/>
    </style:style>
    <style:style style:name="T150" style:parent-style-name="Hyperlink" style:family="text">
      <style:text-properties fo:font-weight="bold" style:font-weight-asian="bold" style:font-weight-complex="bold"/>
    </style:style>
    <style:style style:name="T151" style:parent-style-name="Hyperlink"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Hyperlink" style:family="text">
      <style:text-properties fo:font-weight="bold" style:font-weight-asian="bold" style:font-weight-complex="bold"/>
    </style:style>
    <style:style style:name="T154" style:parent-style-name="Hyperlink" style:family="text">
      <style:text-properties fo:font-weight="bold" style:font-weight-asian="bold" style:font-weight-complex="bold"/>
    </style:style>
    <style:style style:name="T155" style:parent-style-name="Hyperlink" style:family="text">
      <style:text-properties fo:font-weight="bold" style:font-weight-asian="bold" style:font-weight-complex="bold"/>
    </style:style>
    <style:style style:name="T156" style:parent-style-name="Hyperlink" style:family="text">
      <style:text-properties fo:font-weight="bold" style:font-weight-asian="bold" style:font-weight-complex="bold"/>
    </style:style>
    <style:style style:name="P157" style:parent-style-name="Normal" style:family="paragraph">
      <style:text-properties fo:font-weight="bold" style:font-weight-asian="bold" style:font-weight-complex="bold"/>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nalysis of the use of virtual reality in games and if it is beneficial to the games company and the consumer</text:p>
      <text:p text:style-name="Normal"/>
      <text:p text:style-name="Normal">By<text:s/></text:p>
      <text:p text:style-name="Normal">Oliver hurst<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able of contents</text:p>
      <text:p text:style-name="Normal">Pages 1<text:s/>to 3<text:s/>- introduction and <text:s/>literature review</text:p>
      <text:p text:style-name="Normal"/>
      <text:p text:style-name="P2">Pages<text:s/>4<text:s/>to<text:s/>6<text:s/>– discussion<text:s/></text:p>
      <text:p text:style-name="P3"/>
      <text:p text:style-name="P4">Page 7 – conclusion<text:s/></text:p>
      <text:p text:style-name="P5"/>
      <text:p text:style-name="P6">Page<text:s/>8<text:s/>and 9<text:s/>- bibliography<text:s/></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p text:style-name="Normal"><text:span text:style-name="T24">introduction</text:span></text:p>
      <text:p text:style-name="Normal">Research <text:s/>into virtual reality has increased over a relatively short period of time as virtual reality(vr) technology has become more accessible and commercially available. Studies that focus on vr explore how immersion, realism and physical interaction affect <text:s/>people. <text:s/></text:p>
      <text:p text:style-name="Normal">This report will analyse and determine whether a games <text:s/>company should port an arena <text:s/>combat game over to virtual reality, this will be attempted by weighing the positives of such a move against the negatives to find a result</text:p>
      <text:p text:style-name="Normal"/>
      <text:p text:style-name="Normal"/>
      <text:p text:style-name="P25">Literature review<text:s/></text:p>
      <text:p text:style-name="Normal"/>
      <text:p text:style-name="Normal">One of the most talked about selling points of vr is its immersion, one paper detailing this is <text:s text:c="2"/>Slater and Wilbur (<text:span text:style-name="T26">A Framework for Immersive Virtual Environments (FIVE) 1997)<text:s/></text:span>explores the meaning and distinction between the terms immersion and presence, they argued that the former was objective while the latter was subjective and if immersion is objective then it can be replicated using <text:s/>technology specifically vr. This relates to the games company dilemma because <text:s/>in the paper cited above <text:s/>goes into detail explaining how yes the technology for vr is there and it immerses people but, <text:s/>it is inherently constrained when it comes to presence or the feeling of being there, this is because <text:s/>in some aspects technology has not caught up with humans yet, take the visual aspect of vr, you need a <text:s/>headset just to see <text:s/>and <text:s/>currently the things we see <text:s/>in vr are not as clear and crisp as they would be in real life<text:s/></text:p>
      <text:p text:style-name="Normal">This suggests that immersion can be created and improved upon which improves player engagement <text:s/>which is the aim but conversely it does have a trade of as suggested by<text:span text:style-name="T27"><text:s/>Cummings and Beilenson in their meta paper How Immersive Is Enough? (2016)</text:span></text:p>
      <text:p text:style-name="Normal">This meta analyses took into account 83 studies <text:s/>to determine <text:s/>what influence vr and immersion have <text:s/>on the presence of a person, they came to a hypothesis of highly immersive systems can produce stronger emotional reactions than traditional media because users feel directly involved in events rather than simply observing them. This links back to the games company because, it brings up a valid concern that will be delved into deeper later in this report , the social aspect of vr, if people <text:s/>have stronger emotional responses in vr then the game may experience a more toxic fanbase because more competitive games bring out competition in people which can lead to a more toxic atmosphere ( Countering Toxicity in Online Competitive Games by<text:s/><text:a xlink:href="https://www.researchgate.net/scientific-contributions/DeYou-Chou-2249685840?_tp=eyJjb250ZXh0Ijp7ImZpcnN0UGFnZSI6InB1YmxpY2F0aW9uIiwicGFnZSI6InB1YmxpY2F0aW9uIn19" office:target-frame-name="_top" xlink:show="replace"><text:span text:style-name="T28">DeYou Ch</text:span><text:bookmark-start text:name="_Hlt231385250"/><text:bookmark-start text:name="_Hlt231385251"/><text:span text:style-name="T29">o</text:span><text:bookmark-end text:name="_Hlt231385250"/><text:bookmark-end text:name="_Hlt231385251"/><text:span text:style-name="T30">u</text:span></text:a>(April<text:s/><text:soft-page-break/>2023) which sets out to answer the questions “ what <text:s/>does it mean <text:s/>to be toxic?” and “are there different types of toxicity?”</text:p>
      <text:p text:style-name="Normal"/>
      <text:p text:style-name="Normal">A major area of VR research concerns cybersickness, commonly referred to as VR sickness.<text:span text:style-name="T31"><text:s/>LaViola (A discussion of cybersickness in virtual environments</text:span></text:p>
      <text:p text:style-name="Normal"><text:span text:style-name="T32">(2000)<text:s/></text:span>explains that VR sickness is caused by sensory conflict between visual motion cues and signals from the vestibular system. When players visually perceive movement without corresponding physical motion, symptoms such as nausea, dizziness, and headaches can occur this is the same way people get carsick. This<text:s/>links <text:s/>back to the games company because if people get dizzy playing your game, they wont play it for long.</text:p>
      <text:p text:style-name="Normal">Research by<text:span text:style-name="T33"><text:s/>Rebenitsch and Owen (Review on cybersickness in applications and visual displays 2016)<text:s/></text:span>found that latency, low frame rates, and unnatural movement systems significantly increase the likelihood of cybersickness. Fast-paced gameplay, such as sprinting and rapid turning in<text:s/>combat arena<text:s/><text:s/>games, can therefore worsen symptoms and thus alienate affected players form enjoying the experience.</text:p>
      <text:p text:style-name="P34"/>
      <text:p text:style-name="P35"/>
      <text:p text:style-name="P36"/>
      <text:p text:style-name="Normal">The psychological impact of violent video games has been debated for many years. VR introduces a new dimension to this debate because players physically perform actions rather than pressing buttons on a controller<text:span text:style-name="T37">. Madary and Metzinger (Real Virtuality: A Code of Ethical Conduct. Recommendations for Good Scientific Practice and the Consumers of VR-Technology 2016)<text:s/></text:span>argued that VR experiences may have stronger emotional and behavioural effects because they create a convincing sense of embodiment and presence, however as of yet this has not lead to people doing violent acts due to what they did in a game, although more research is needed to fully understand <text:s/>the influence vr has this way<text:s/></text:p>
      <text:p text:style-name="P38"/>
      <text:p text:style-name="P39"/>
      <text:p text:style-name="Normal">Social interaction is another major research area in VR<text:span text:style-name="T40">. Freeman et al. ("Automated virtual reality therapy to treat agoraphobic avoidance and distress in patients with psychosis” ,2022) <text:s/></text:span>was a study that <text:s/>took 346 people from England who each were experiencing serious anxious avoidance and distress, the study put the patients in a vr therapy environment , they were measuring 2 groups, regular therapy and therapy with vr included to determine <text:s/>to what degree if any does vr help people,</text:p>
      <text:soft-page-break/>
      <text:p text:style-name="Normal">What they found was a significant reduction <text:s/>in agoraphobic avoidance compared to the control group,</text:p>
      <text:p text:style-name="Normal"/>
      <text:p text:style-name="Normal">The literature strongly supports the use of moderation systems, mute functions, reporting tools, and personal safety boundaries to reduce harm in social VR environments <text:s/>this <text:s text:c="2"/>suggests <text:s/>a way to integrate vr into games where its isn’t harmful but beneficiary.<text:s/></text:p>
      <text:p text:style-name="Normal">If the benefits of the above study want to be found however then the games company need to implement<text:s/><text:s/>the<text:s/>safeguards as seen above to let the player decide if they want to contribute socially because as seen above more competitive games attract toxic players, if these safeguards are not in place you will see the inverse happen and you will see a rise of serious anxious avoidance and distress<text:s/>in the player base<text:s/></text:p>
      <text:p text:style-name="Normal">Another serious study that highlights the concerns of vr is<text:s/></text:p>
      <text:p text:style-name="Normal">(<text:span text:style-name="T41">Privacy threats of behaviour identity detection in VR</text:span><text:s/>by<text:s/><text:a xlink:href="https://loop.frontiersin.org/people/135180" office:target-frame-name="_top" xlink:show="replace"><text:span text:style-name="Hyperlink">Robert W. Lindeman </text:span><text:span text:style-name="T42"><text:s/></text:span><text:span text:style-name="Hyperlink">,<text:s/></text:span><text:a xlink:href="https://loop.frontiersin.org/people/666263" office:target-frame-name="_top" xlink:show="replace"><text:span text:style-name="Hyperlink">Sungchul Jung </text:span></text:a></text:a>and <text:s/><text:a xlink:href="https://loop.frontiersin.org/people/2179739" office:target-frame-name="_top" xlink:show="replace"><text:span text:style-name="Hyperlink">Dilshani Kumarapeli (January 2024))<text:s/></text:span></text:a></text:p>
      <text:p text:style-name="Normal">This study aims to document the effects vr has on privacy, it does this by arguing that the feedback the vr headset is giving the player also gives feedback to the games <text:s/>company which can be used in any number of ways from, improving the player experience to more nefarious <text:s/>things that if the player knew about they may not consent to be a part of it such as spying( extreme, I know but possible)</text:p>
      <text:p text:style-name="Normal"/>
      <text:p text:style-name="Normal"/>
      <text:p text:style-name="P43"/>
      <text:p text:style-name="P44"/>
      <text:p text:style-name="P45"/>
      <text:p text:style-name="P46"><text:s/></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discussion<text:s/></text:p>
      <text:p text:style-name="P61"/>
      <text:p text:style-name="Normal">The use of virtual reality (VR) in gaming has become increasingly popular due to improvements in technology, graphics, and affordability. VR allows players to experience games in a far more immersive way than traditional gaming because users can physically interact with the virtual environment and feel present within the game world. While many people consider VR gaming to be exciting and innovative, there is ongoing debate about whether VR is ultimately good or bad for the people who play these games. The impact of VR gaming can be viewed from both positive and negative perspectives, as it affects users physically, psychologically, and socially.</text:p>
      <text:p text:style-name="Normal">One of the main advantages of VR gaming is the increased level of immersion and engagement it provides. Traditional games are played through a screen using a controller or keyboard, whereas VR places the player directly into the environment. This can make games more entertaining, realistic, and emotionally engaging. some studies like one by<text:s/><text:span text:style-name="T62">Slater and Wilbur (A Framework for Immersive Virtual Environments (FIVE) <text:s/>1997)</text:span><text:s/>suggests that immersion and presence are key features of VR experiences, allowing users to feel as though they are physically inside the virtual world. For many players, this creates a more enjoyable and memorable gaming experience.</text:p>
      <text:p text:style-name="Normal">VR gaming may also have positive physical benefits compared to traditional gaming. Many VR games require movement such as walking, reaching, crouching, or turning, meaning players are more physically active. Games involving fitness, rhythm, or sports can encourage exercise and reduce sedentary behaviour as seen in (<text:span text:style-name="T63">Exploring actual and perceived levels of physical activity intensity during virtual reality active games(09 February 2024))</text:span><text:s text:c="3"/>Unlike conventional gaming, which is often associated with sitting for long periods, VR can promote movement and coordination. Some studies have even suggested that VR games may improve reaction times, hand-eye coordination, and spatial awareness especially in kids with cerebral palsy, <text:s/>as seen in<text:s/><text:soft-page-break/><text:span text:style-name="T64">(Use of virtual reality intervention to improve reaction time in children with cerebral palsy: A randomized controlled trial by</text:span><text:s/><text:span text:style-name="T65">Morteza Pourazar</text:span><text:s/>,<text:span text:style-name="T66"><text:s/></text:span><text:a xlink:href="https://www.researchgate.net/scientific-contributions/Fatemeh-Mirakhori-2229930977?_tp=eyJjb250ZXh0Ijp7ImZpcnN0UGFnZSI6InB1YmxpY2F0aW9uIiwicGFnZSI6InB1YmxpY2F0aW9uIn19" office:target-frame-name="_top" xlink:show="replace"><text:span text:style-name="T67">Fatemeh Mirakhori</text:span></text:a>,<text:span text:style-name="T68"><text:s/></text:span><text:a xlink:href="https://www.researchgate.net/profile/Rasool-Hemayattalab?_tp=eyJjb250ZXh0Ijp7ImZpcnN0UGFnZSI6InB1YmxpY2F0aW9uIiwicGFnZSI6InB1YmxpY2F0aW9uIn19" office:target-frame-name="_top" xlink:show="replace"><text:span text:style-name="T69">Rasool Hemayattalab,</text:span></text:a><text:s text:c="2"/>and<text:s/><text:a xlink:href="https://www.researchgate.net/profile/Fazlollah-Bagherzadeh?_tp=eyJjb250ZXh0Ijp7ImZpcnN0UGFnZSI6InB1YmxpY2F0aW9uIiwicGFnZSI6InB1YmxpY2F0aW9uIn19" office:target-frame-name="_top" xlink:show="replace"><text:span text:style-name="T70">Fazlollah Bagherzadeh</text:span></text:a>(published in <text:s/>September 2017))<text:s/></text:p>
      <text:p text:style-name="Normal">This has the benefit of making the game into something that has real world applications, and can be used as therapy.</text:p>
      <text:p text:style-name="Normal">In addition, VR has been used in educational and therapeutic contexts. Certain VR applications are used for rehabilitation, anxiety treatment, and training simulations. This demonstrates that VR technology itself is not inherently harmful and can provide meaningful benefits when used responsibly. Multiplayer VR games may also help some individuals socialise, particularly those who struggle with face-to-face interaction. Voice chat and shared virtual environments can create strong feelings of social presence and teamwork as seen in <text:s/><text:span text:style-name="T71"><text:s/>Freeman et al. ("Automated virtual reality therapy to treat agoraphobic avoidance and distress in patients with psychosis” ,2022)</text:span></text:p>
      <text:p text:style-name="Normal">However, despite these benefits, VR gaming also presents several serious concerns. One of the most significant issues is the risk of physiological discomfort. VR sickness, also known as cybersickness, is a common problem experienced by many users. Symptoms such as nausea, headaches, dizziness, and eye strain occur because the brain receives conflicting signals between what the player sees and what their body physically feels. Fast-paced games with rapid movement can make these symptoms worse. Research by Rebenitsch and Owen (2016) found that latency and unnatural movement systems significantly increase motion sickness in VR environments, which links back to the games company because if you get dizzy playing a game, will you play that game for long?</text:p>
      <text:p text:style-name="Normal">Physical safety is another concern. Because players cannot fully see the real world while wearing a headset, they may accidentally collide with furniture, walls, or other people. In intense action games, players may react instinctively by ducking, jumping, or turning quickly, increasing the likelihood of injury as seen in the study (<text:span text:style-name="T72">Virtual reality consumer product injuries: An analysis of national emergency department data by<text:s/></text:span><text:a xlink:href="https://pubmed.ncbi.nlm.nih.gov/?term=Cucher+DJ&amp;cauthor_id=36803922" office:target-frame-name="_top" xlink:show="replace"><text:span text:style-name="T73">Daniel J Cucher</text:span></text:a><text:span text:style-name="T74"> </text:span><text:span text:style-name="T75">, </text:span><text:a xlink:href="https://pubmed.ncbi.nlm.nih.gov/?term=Kovacs+MS&amp;cauthor_id=36803922" office:target-frame-name="_top" xlink:show="replace"><text:span text:style-name="T76">Melissa S Kovacs</text:span></text:a><text:span text:style-name="T77"> </text:span><text:span text:style-name="T78">, </text:span><text:a xlink:href="https://pubmed.ncbi.nlm.nih.gov/?term=Clark+CE&amp;cauthor_id=36803922" office:target-frame-name="_top" xlink:show="replace"><text:span text:style-name="T79">Clarence E Clark</text:span></text:a><text:span text:style-name="T80"> </text:span><text:span text:style-name="T81">, </text:span><text:a xlink:href="https://pubmed.ncbi.nlm.nih.gov/?term=Hu+CKP&amp;cauthor_id=36803922" office:target-frame-name="_top" xlink:show="replace"><text:span text:style-name="T82">Charles K P Hu</text:span></text:a><text:span text:style-name="T83"><text:s/>published (2023 )),<text:s/></text:span>this paper details vr related injuries which only increased with the technology, the study looked at emergency room visits from 2013 to 2021 and saw the total number of emergency room visits in 2021 to be 1,336 with fracture being the top reason .Long gaming sessions may also lead to fatigue, neck strain, or repetitive strain injuries caused by holding controllers and headsets for extended periods.</text:p>
      <text:p text:style-name="Normal">The psychological effects of VR gaming are also widely debated. Violent VR games may feel more intense than traditional games because players physically perform actions rather than simply pressing buttons. Photorealistic graphics and realistic weapon mechanics can increase emotional reactions during gameplay. Some researchers argue<text:s/><text:soft-page-break/>that repeated exposure to violent content could contribute to aggression or desensitisation to violence, although there is no clear agreement within the research community. Ferguson (2015) argues that evidence linking video games directly to violent behaviour remains inconsistent. Nevertheless, VR may intensify emotional experiences due to the heightened sense of realism and<text:s/>immersion.</text:p>
      <text:p text:style-name="Normal">Another major issue is the potential impact on mental health and addictive behaviour. Competitive VR games can become highly immersive and time-consuming, encouraging players to spend long periods in virtual environments. Excessive gaming may negatively affect sleep, education, work, and social relationships. Some individuals may begin to prefer virtual interactions over real-world communication, leading to isolation. Younger players may be especially vulnerable because they are still developing emotionally and socially. This is backed up by research as seen in (Virtual Reality Gaming Addiction by<text:s/><text:a xlink:href="https://www.researchgate.net/profile/Amala-Rajan?_tp=eyJjb250ZXh0Ijp7ImZpcnN0UGFnZSI6InB1YmxpY2F0aW9uIiwicGFnZSI6InB1YmxpY2F0aW9uIn19" office:target-frame-name="_top" xlink:show="replace"><text:span text:style-name="T84">Amala V. Rajan</text:span></text:a><text:s/>,<text:s/><text:a xlink:href="https://www.researchgate.net/profile/Nasser-Nassiri-3?_tp=eyJjb250ZXh0Ijp7ImZpcnN0UGFnZSI6InB1YmxpY2F0aW9uIiwicGFnZSI6InB1YmxpY2F0aW9uIn19" office:target-frame-name="_top" xlink:show="replace"><text:span text:style-name="T85">Nasser Nassiri</text:span></text:a>,<text:s/><text:a xlink:href="https://www.researchgate.net/profile/Vishwesh-Akre?_tp=eyJjb250ZXh0Ijp7ImZpcnN0UGFnZSI6InB1YmxpY2F0aW9uIiwicGFnZSI6InB1YmxpY2F0aW9uIn19" office:target-frame-name="_top" xlink:show="replace"><text:span text:style-name="T86">Vishwesh L. Akre</text:span></text:a>, and<text:s/><text:a xlink:href="https://www.researchgate.net/profile/Rejitha-Ravikumar?_tp=eyJjb250ZXh0Ijp7ImZpcnN0UGFnZSI6InB1YmxpY2F0aW9uIiwicGFnZSI6InB1YmxpY2F0aW9uIn19" office:target-frame-name="_top" xlink:show="replace"><text:span text:style-name="T87">Rejitha Ravikumar</text:span></text:a><text:s/>(November 2018))</text:p>
      <text:p text:style-name="Normal"/>
      <text:p text:style-name="Normal">Social behaviour within VR environments also creates risks. Multiplayer VR games often use proximity voice chat and realistic avatars, making interactions feel more personal. While this can improve teamwork and communication, it can also intensify harassment, bullying, or toxic behaviour. As seen in<text:s/><text:span text:style-name="T88">Countering Toxicity in Online Competitive Games</text:span><text:s text:c="2"/>Research has shown that harassment in VR can feel more invasive than in traditional online games because users experience abuse in a shared virtual space rather than through text on a screen, this feeling is intensified when we know the immersive nature of vr leads to more emotive responses from people.<text:s/>This can negatively affect player wellbeing and discourage participation.</text:p>
      <text:p text:style-name="Normal">Privacy is another growing concern in VR gaming. VR systems can collect large amounts of personal and biometric data, including movement patterns, voice recordings, and eye-tracking information. If this data is mishandled, leaked, or used without proper consent, it could create serious ethical and legal issues. Players may not fully understand how much information VR systems collect or how companies use that data. This can be seen in (<text:span text:style-name="T89">Privacy threats of behaviour identity detection in VR</text:span><text:s/>by<text:s/><text:a xlink:href="https://loop.frontiersin.org/people/135180" office:target-frame-name="_top" xlink:show="replace"><text:span text:style-name="Hyperlink">Robert W. Lindeman </text:span><text:span text:style-name="T90"><text:s/></text:span><text:span text:style-name="Hyperlink">,<text:s/></text:span><text:a xlink:href="https://loop.frontiersin.org/people/666263" office:target-frame-name="_top" xlink:show="replace"><text:span text:style-name="Hyperlink">Sungchul Jung </text:span></text:a></text:a>and <text:s/><text:a xlink:href="https://loop.frontiersin.org/people/2179739" office:target-frame-name="_top" xlink:show="replace"><text:span text:style-name="Hyperlink">Dilshani Kumarapeli (January 2024))</text:span><text:bookmark-start text:name="_Hlt231392685"/><text:bookmark-start text:name="_Hlt231392686"/><text:bookmark-start text:name="_Hlt231392689"/><text:bookmark-end text:name="_Hlt231392685"/><text:bookmark-end text:name="_Hlt231392686"/><text:bookmark-end text:name="_Hlt231392689"/><text:span text:style-name="Hyperlink"><text:s/></text:span><text:bookmark-start text:name="_Hlt231392696"/><text:bookmark-start text:name="_Hlt231392697"/><text:bookmark-end text:name="_Hlt231392696"/><text:bookmark-end text:name="_Hlt231392697"/></text:a></text:p>
      <text:p text:style-name="Normal">This study aims to document the effects vr has on privacy, it does this by arguing that the feedback the vr headset is giving the player also gives feedback to the games <text:s/>company which can be used in any number of ways from, improving the player experience to more nefarious <text:s/>things that if the player knew about they may not consent to be a part of it such as spying( extreme, I know but possible)</text:p>
      <text:p text:style-name="Normal"/>
      <text:soft-page-break/>
      <text:p text:style-name="Normal">Despite these risks, many of the negative effects of VR gaming can be reduced through responsible design and moderation. Developers can implement comfort settings, motion reduction systems, parental controls, accessibility options, and moderation tools to improve safety. Features such as adjustable movement settings, mute functions, play-time reminders, and safe play boundaries can significantly reduce harm. Ethical game design is therefore extremely important in ensuring that VR remains beneficial rather than harmful.</text:p>
      <text:p text:style-name="Normal"/>
      <text:p text:style-name="Normal"/>
      <text:p text:style-name="Normal"/>
      <text:p text:style-name="Normal"/>
      <text:p text:style-name="Normal"><text:span text:style-name="T91">conclusion</text:span></text:p>
      <text:p text:style-name="Normal"/>
      <text:p text:style-name="Normal">In conclusion , the use of VR in gaming has both positive and negative consequences for players. VR offers highly immersive entertainment, opportunities for physical activity, and social interaction that traditional gaming cannot fully replicate. However, it also introduces risks including motion sickness, physical injury, addiction, psychological stress, harassment, and privacy concerns. Whether VR gaming is ultimately “good” or “bad” depends largely on how the technology is designed, moderated, and used by players. With appropriate safety measures and responsible use, VR has the potential to provide enjoyable and valuable experiences .Without these protections however,<text:s/>the inverse is true as without appropriate safety standards the technology is prone for misuse and harmful cycles,<text:s/>such as addiction and dependency which <text:s/>directly correlates with how young <text:s/>the vr user is.<text:s/><text:s/>How the industry can prevent vr and xr in general from becoming a scourge is for strict regulations to be put in place that are centred on player agency, these regulations could include, adjustable play reminders, like in gambling sites this could be used to get the player to think about the amount of time<text:s/>they<text:s/><text:s/>play, <text:s/>another regulation could be the ability that is already used in games, the mute button on voice chats and repercussions for those who are harmful to <text:s/>the social online space.<text:s/>As a whole I<text:s/>firmly<text:s/>believe that there is a use for xr in general, ar more than vr but I believe that<text:s/>ultimately<text:s/>the negatives both<text:s/>physically, mentally and socially do not outweigh the pros, in a<text:s/>gaming<text:s/>sense<text:s/>as the technology can be too<text:s/>easily<text:s/>abused and not enough people know <text:s/>enough about <text:s/>vr and its ramifications<text:s/>for <text:s/>these negatives to be dismissed<text:s/>or reduced <text:s/>to safer levels.</text:p>
      <text:p text:style-name="Normal"/>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Bibliography</text:p>
      <text:p text:style-name="P107">How we experience immersive virtual environments: The concept of presence and its measurement <text:s/>Slater and Wilbur (1997)</text:p>
      <text:p text:style-name="P108"/>
      <text:p text:style-name="Normal"><text:a xlink:href="https://www.researchgate.net/publication/228751198_How_we_experience_immersive_virtual_environments_The_concept_of_presence_and_its_measurement" office:target-frame-name="_top" xlink:show="replace"><text:span text:style-name="T109">https://www.researchgate.net/publication/228751198_How_we_experience_immersive_virtual</text:span><text:bookmark-start text:name="_Hlt231383980"/><text:bookmark-start text:name="_Hlt231383981"/><text:span text:style-name="T110">_</text:span><text:bookmark-end text:name="_Hlt231383980"/><text:bookmark-end text:name="_Hlt231383981"/><text:span text:style-name="T111">environments_The_concept_of_presence_and_its_measurement</text:span></text:a><text:span text:style-name="T112"><text:s/></text:span></text:p>
      <text:p text:style-name="P113"/>
      <text:p text:style-name="P114">How Immersive Is Enough? A Meta-Analysis of the Effect of Immersive Technology on User Presence</text:p>
      <text:p text:style-name="P115"><text:s/>Cummings and Bailenson (2016),<text:s/></text:p>
      <text:p text:style-name="Normal"><text:a xlink:href="https://www.semanticscholar.org/paper/How-Immersive-Is-Enough-A-Meta-Analysis-of-the-of-Cummings-Bailenson/33fc3de4871635fd8c45419b32fbd078b7f974d2" office:target-frame-name="_top" xlink:show="replace"><text:span text:style-name="T116">https://www.semanticscholar.org/paper/How-Immersive-Is-Enough-A-Meta-Analysis-of-the-of-Cummings-Bailenson/33fc3de4871635fd8c45419b32fbd078b7f974d2</text:span></text:a></text:p>
      <text:p text:style-name="P117"/>
      <text:p text:style-name="P118">A discussion of cybersickness in virtual environments LaViola (2000)</text:p>
      <text:p text:style-name="P119"/>
      <text:p text:style-name="Normal"><text:a xlink:href="https://www.researchgate.net/publication/234790692_A_discussion_of_cybersickness_in_virtual_environments" office:target-frame-name="_top" xlink:show="replace"><text:span text:style-name="T120">https://www.researchgate.net/publication/234790692_A_discussion_of_cybersickness_in_virtual_environments</text:span></text:a><text:span text:style-name="T121"><text:s text:c="2"/></text:span></text:p>
      <text:p text:style-name="P122"/>
      <text:p text:style-name="Normal"><text:span text:style-name="T123">Review on cybersickness in applications and visual displays</text:span><text:s/><text:span text:style-name="T124">Rebenitsch and Owen (2016)<text:s/></text:span></text:p>
      <text:p text:style-name="P125"/>
      <text:p text:style-name="Normal"><text:a xlink:href="https://www.researchgate.net/publication/301664973_Review_on_cybersickness_in_applications_and_visual_displays" office:target-frame-name="_top" xlink:show="replace"><text:span text:style-name="T126">https://www.researchgate.net/publication/301664973_Review_on_cybersickness_in_applications_and_visual_displays</text:span></text:a></text:p>
      <text:p text:style-name="P127"/>
      <text:p text:style-name="Normal"><text:a xlink:href="https://philarchive.org/go.pl?id=MADRVA-3&amp;proxyId=&amp;u=https%3A%2F%2Fphilpapers.org%2Farchive%2FMADRVA-3.pdf" office:target-frame-name="_top" xlink:show="replace"><text:span text:style-name="T128">Real Virtuality: A Code of Ethical Conduct. Recommendations for Good Scientific Practice and the Consumers of VR-Technology</text:span></text:a><text:span text:style-name="T129"><text:s/></text:span><text:a office:title="View other works by Michael Madary" xlink:href="https://philarchive.org/s/Michael%20Madary" office:target-frame-name="_top" xlink:show="replace"><text:span text:style-name="T130">Michael Madary</text:span></text:a><text:span text:style-name="T131"> &amp; </text:span><text:a office:title="View other works by Thomas Metzinger" xlink:href="https://philarchive.org/s/Thomas%20Metzinger" office:target-frame-name="_top" xlink:show="replace"><text:span text:style-name="T132">Thomas Metzinger</text:span></text:a><text:span text:style-name="T133"><text:s/></text:span></text:p>
      <text:p text:style-name="Normal"><text:a xlink:href="https://philarchive.org/rec/MADRVA-3" office:target-frame-name="_top" xlink:show="replace"><text:span text:style-name="T134">https://philarchive.org/rec/MADRVA-3</text:span></text:a><text:span text:style-name="T135"><text:s/></text:span></text:p>
      <text:p text:style-name="Normal"><text:s/>Countering Toxicity in Online Competitive Games by<text:s/><text:a xlink:href="https://www.researchgate.net/scientific-contributions/DeYou-Chou-2249685840?_tp=eyJjb250ZXh0Ijp7ImZpcnN0UGFnZSI6InB1YmxpY2F0aW9uIiwicGFnZSI6InB1YmxpY2F0aW9uIn19" office:target-frame-name="_top" xlink:show="replace"><text:span text:style-name="T136">DeYou Chou</text:span></text:a><text:s/>April 2023</text:p>
      <text:p text:style-name="Normal"><text:a xlink:href="https://www.researchgate.net/publication/370217640_Countering_Toxicity_in_Online_Competitive_Games" office:target-frame-name="_top" xlink:show="replace"><text:span text:style-name="Hyperlink">https://www.researchgate.net/publication/370217640_Countering_Toxicity_in_Online_Competitive_Games</text:span></text:a><text:s/></text:p>
      <text:p text:style-name="P137"/>
      <text:p text:style-name="P138"><text:s/></text:p>
      <text:p text:style-name="P139">Exploring actual and perceived levels of physical activity intensity during virtual reality active games(09 February 2024))<text:s/></text:p>
      <text:p text:style-name="Normal"><text:a xlink:href="https://www.frontiersin.org/journals/sports-and-active-living/articles/10.3389/fspor.2024.1349521/full" office:target-frame-name="_top" xlink:show="replace"><text:span text:style-name="T140">https://www.frontiersin.org/journals/sports-and-active-living/articles/10.3389/fspor.2024.1349521/full</text:span></text:a><text:span text:style-name="T141"><text:s/></text:span></text:p>
      <text:p text:style-name="P142"/>
      <text:p text:style-name="P143"/>
      <text:p text:style-name="P144"/>
      <text:p text:style-name="Normal"><text:span text:style-name="T145">(Use of virtual reality intervention to improve reaction time in children with cerebral palsy: A randomized controlled trial Morteza Pourazar</text:span><text:s/>,<text:span text:style-name="T146"><text:s/></text:span><text:a xlink:href="https://www.researchgate.net/scientific-contributions/Fatemeh-Mirakhori-2229930977?_tp=eyJjb250ZXh0Ijp7ImZpcnN0UGFnZSI6InB1YmxpY2F0aW9uIiwicGFnZSI6InB1YmxpY2F0aW9uIn19" office:target-frame-name="_top" xlink:show="replace"><text:span text:style-name="T147">Fatemeh Mirakhori</text:span></text:a>,<text:span text:style-name="T148"><text:s/></text:span><text:a xlink:href="https://www.researchgate.net/profile/Rasool-Hemayattalab?_tp=eyJjb250ZXh0Ijp7ImZpcnN0UGFnZSI6InB1YmxpY2F0aW9uIiwicGFnZSI6InB1YmxpY2F0aW9uIn19" office:target-frame-name="_top" xlink:show="replace"><text:span text:style-name="T149">Rasool Hemayattalab,</text:span></text:a><text:s text:c="2"/>and<text:s/><text:a xlink:href="https://www.researchgate.net/profile/Fazlollah-Bagherzadeh?_tp=eyJjb250ZXh0Ijp7ImZpcnN0UGFnZSI6InB1YmxpY2F0aW9uIiwicGFnZSI6InB1YmxpY2F0aW9uIn19" office:target-frame-name="_top" xlink:show="replace"><text:span text:style-name="T150">Fazlollah Bagherzadeh</text:span></text:a></text:p>
      <text:p text:style-name="Normal"><text:a xlink:href="https://www.researchgate.net/publication/319970397_Use_of_virtual_reality_intervention_to_improve_reaction_time_in_children_with_cerebral_palsy_A_randomized_controlled_trial" office:target-frame-name="_top" xlink:show="replace"><text:span text:style-name="T151">https://www.researchgate.net/publication/319970397_Use_of_virtual_reality_intervention_to_improve_reaction_time_in_children_with_cerebral_palsy_A_randomized_controlled_trial</text:span></text:a><text:span text:style-name="T152"><text:s/></text:span></text:p>
      <text:soft-page-break/>
      <text:p text:style-name="Normal">Virtual Reality Gaming Addiction by<text:s/><text:a xlink:href="https://www.researchgate.net/profile/Amala-Rajan?_tp=eyJjb250ZXh0Ijp7ImZpcnN0UGFnZSI6InB1YmxpY2F0aW9uIiwicGFnZSI6InB1YmxpY2F0aW9uIn19" office:target-frame-name="_top" xlink:show="replace"><text:span text:style-name="T153">Amala V. Rajan</text:span></text:a><text:s/>,<text:s/><text:a xlink:href="https://www.researchgate.net/profile/Nasser-Nassiri-3?_tp=eyJjb250ZXh0Ijp7ImZpcnN0UGFnZSI6InB1YmxpY2F0aW9uIiwicGFnZSI6InB1YmxpY2F0aW9uIn19" office:target-frame-name="_top" xlink:show="replace"><text:span text:style-name="T154">Nasser Nassiri</text:span></text:a>,<text:s/><text:a xlink:href="https://www.researchgate.net/profile/Vishwesh-Akre?_tp=eyJjb250ZXh0Ijp7ImZpcnN0UGFnZSI6InB1YmxpY2F0aW9uIiwicGFnZSI6InB1YmxpY2F0aW9uIn19" office:target-frame-name="_top" xlink:show="replace"><text:span text:style-name="T155">Vishwesh L. Akre</text:span></text:a>, and<text:s/><text:a xlink:href="https://www.researchgate.net/profile/Rejitha-Ravikumar?_tp=eyJjb250ZXh0Ijp7ImZpcnN0UGFnZSI6InB1YmxpY2F0aW9uIiwicGFnZSI6InB1YmxpY2F0aW9uIn19" office:target-frame-name="_top" xlink:show="replace"><text:span text:style-name="T156">Rejitha Ravikumar</text:span></text:a><text:s/>(November 2018))</text:p>
      <text:p text:style-name="Normal"><text:a xlink:href="https://www.researchgate.net/publication/331347512_Virtual_Reality_Gaming_Addiction" office:target-frame-name="_top" xlink:show="replace"><text:span text:style-name="Hyperlink">https://www.researchgate.net/publication/331347512_Virtual_Reality_Gaming_Addiction</text:span></text:a><text:s/></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Oliver hurst h021185l, experimental systems , assessment 1 report<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er Hurst</meta:initial-creator>
    <dc:creator>Oliver Hurst</dc:creator>
    <meta:creation-date>2026-06-16T19:28:00Z</meta:creation-date>
    <dc:date>2026-06-16T19:28:00Z</dc:date>
    <meta:template xlink:href="Normal.dotm" xlink:type="simple"/>
    <meta:editing-cycles>2</meta:editing-cycles>
    <meta:editing-duration>PT0S</meta:editing-duration>
    <meta:document-statistic meta:page-count="12" meta:paragraph-count="47" meta:word-count="3530" meta:character-count="23605" meta:row-count="167" meta:non-whitespace-character-count="20122"/>
  </office:meta>
</office:document-meta>
</file>